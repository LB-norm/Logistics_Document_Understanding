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satz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Workflow</text:p>
          </table:table-cell>
        </table:table-row>
        <table:table-row table:style-name="ro1">
          <table:table-cell office:value-type="string" calcext:value-type="string">
            <text:p>Parser + LLM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ild → Parser → JSON → LLM → JSON</text:p>
          </table:table-cell>
        </table:table-row>
        <table:table-row table:style-name="ro1">
          <table:table-cell office:value-type="string" calcext:value-type="string">
            <text:p>Parser + LLM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ild → Parser → JSON &amp; BILD → LLM → JSON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End-to-End</text:p>
          </table:table-cell>
          <table:table-cell office:value-type="string" calcext:value-type="string">
            <text:p>Bild → DONUT → JSON</text:p>
          </table:table-cell>
        </table:table-row>
        <table:table-row table:style-name="ro1">
          <table:table-cell office:value-type="string" calcext:value-type="string">
            <text:p>QWEN</text:p>
          </table:table-cell>
          <table:table-cell office:value-type="string" calcext:value-type="string">
            <text:p>End-to-End</text:p>
          </table:table-cell>
          <table:table-cell office:value-type="string" calcext:value-type="string">
            <text:p>Bild → QWEN → JS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ep 1: Find the best parser 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tune PPStructureV3 &amp; PaddleOCRVL1.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ep 2: Parserdaten → 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gliche Modelle: Gemma 4 31B, Qwen3-32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 style:data-style-name="N2" text:time-value="12:41:55.73560741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6:31:56.917919853</meta:creation-date>
    <dc:date>2026-04-15T16:51:46.583120851</dc:date>
    <meta:editing-duration>PT4H52M41S</meta:editing-duration>
    <meta:editing-cycles>5</meta:editing-cycles>
    <meta:generator>LibreOffice/24.2.7.2$Linux_X86_64 LibreOffice_project/420$Build-2</meta:generator>
    <meta:document-statistic meta:table-count="1" meta:cell-count="19" meta:object-count="0"/>
  </office:meta>
</office:document-meta>
</file>